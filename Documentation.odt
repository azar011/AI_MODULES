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21ddb7" officeooo:paragraph-rsid="0021ddb7"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224528" officeooo:paragraph-rsid="00224528" style:font-size-asian="18pt" style:font-weight-asian="bold" style:font-size-complex="18pt" style:font-weight-complex="bold"/>
    </style:style>
    <style:style style:name="P3" style:family="paragraph" style:parent-style-name="Standard">
      <style:text-properties fo:font-size="18pt" fo:font-weight="bold" officeooo:rsid="0014e25c" officeooo:paragraph-rsid="0014e25c" style:font-size-asian="18pt" style:font-weight-asian="bold" style:font-size-complex="18pt" style:font-weight-complex="bold"/>
    </style:style>
    <style:style style:name="P4" style:family="paragraph" style:parent-style-name="Standard">
      <style:text-properties fo:font-size="16pt" fo:font-weight="bold" officeooo:rsid="0021ddb7" officeooo:paragraph-rsid="0021ddb7" style:font-size-asian="14pt" style:font-weight-asian="bold" style:font-size-complex="16pt" style:font-weight-complex="bold"/>
    </style:style>
    <style:style style:name="P5" style:family="paragraph" style:parent-style-name="Standard">
      <style:text-properties fo:font-size="18pt" officeooo:rsid="0014e25c" officeooo:paragraph-rsid="0014e25c" style:font-size-asian="18pt" style:font-size-complex="18pt"/>
    </style:style>
    <style:style style:name="P6" style:family="paragraph" style:parent-style-name="Standard">
      <style:text-properties fo:font-size="16pt" officeooo:rsid="0014e25c" officeooo:paragraph-rsid="0014e25c" style:font-size-asian="16pt" style:font-size-complex="16pt"/>
    </style:style>
    <style:style style:name="P7" style:family="paragraph" style:parent-style-name="Standard">
      <style:paragraph-properties fo:line-height="150%"/>
      <style:text-properties fo:font-size="14pt" officeooo:rsid="0014e25c" officeooo:paragraph-rsid="0014e25c" style:font-size-asian="14pt" style:font-size-complex="14pt"/>
    </style:style>
    <style:style style:name="P8" style:family="paragraph" style:parent-style-name="Standard">
      <style:text-properties fo:font-size="14pt" officeooo:rsid="0014e25c" officeooo:paragraph-rsid="0014e25c" style:font-size-asian="14pt" style:font-size-complex="14pt"/>
    </style:style>
    <style:style style:name="P9" style:family="paragraph" style:parent-style-name="Standard">
      <style:text-properties officeooo:rsid="0014e25c" officeooo:paragraph-rsid="0014e25c"/>
    </style:style>
    <style:style style:name="P10" style:family="paragraph" style:parent-style-name="Standard">
      <style:paragraph-properties fo:line-height="150%"/>
      <style:text-properties fo:font-size="14pt" fo:font-weight="bold" officeooo:rsid="0014e25c" officeooo:paragraph-rsid="0014e25c" style:font-size-asian="14pt" style:font-weight-asian="bold" style:font-size-complex="14pt" style:font-weight-complex="bold"/>
    </style:style>
    <style:style style:name="P11" style:family="paragraph" style:parent-style-name="Standard">
      <style:paragraph-properties fo:line-height="100%"/>
      <style:text-properties fo:font-size="14pt" officeooo:rsid="0014e25c" officeooo:paragraph-rsid="0014e25c" style:font-size-asian="14pt" style:font-size-complex="14pt"/>
    </style:style>
    <style:style style:name="P12" style:family="paragraph" style:parent-style-name="Standard">
      <style:paragraph-properties fo:line-height="150%"/>
      <style:text-properties fo:font-size="14pt" fo:font-weight="bold" officeooo:rsid="001515cf" officeooo:paragraph-rsid="001515cf" style:font-size-asian="14pt" style:font-weight-asian="bold" style:font-size-complex="14pt" style:font-weight-complex="bold"/>
    </style:style>
    <style:style style:name="P13" style:family="paragraph" style:parent-style-name="Standard">
      <style:text-properties fo:font-size="14pt" fo:font-weight="normal" officeooo:rsid="001515cf" officeooo:paragraph-rsid="001515cf" style:font-size-asian="14pt" style:font-weight-asian="normal" style:font-size-complex="14pt" style:font-weight-complex="normal"/>
    </style:style>
    <style:style style:name="P14" style:family="paragraph" style:parent-style-name="Standard">
      <style:paragraph-properties fo:line-height="150%"/>
      <style:text-properties fo:font-size="16pt" fo:font-weight="bold" officeooo:rsid="001515cf" officeooo:paragraph-rsid="001515cf" style:font-size-asian="14pt" style:font-weight-asian="bold" style:font-size-complex="16pt" style:font-weight-complex="bold"/>
    </style:style>
    <style:style style:name="P15" style:family="paragraph" style:parent-style-name="Standard">
      <style:text-properties fo:font-size="14pt" fo:font-weight="normal" officeooo:rsid="001515cf" officeooo:paragraph-rsid="001515cf" style:font-size-asian="12.25pt" style:font-weight-asian="normal" style:font-size-complex="14pt" style:font-weight-complex="normal"/>
    </style:style>
    <style:style style:name="P16" style:family="paragraph" style:parent-style-name="Standard">
      <style:text-properties fo:font-size="14pt" officeooo:rsid="001515cf" officeooo:paragraph-rsid="001515cf" style:font-size-asian="14pt" style:font-size-complex="14pt"/>
    </style:style>
    <style:style style:name="P17" style:family="paragraph" style:parent-style-name="Standard">
      <style:text-properties fo:font-size="18pt" fo:font-weight="bold" officeooo:rsid="0014e25c" officeooo:paragraph-rsid="0016019f" style:font-size-asian="18pt" style:font-weight-asian="bold" style:font-size-complex="18pt" style:font-weight-complex="bold"/>
    </style:style>
    <style:style style:name="P18" style:family="paragraph" style:parent-style-name="Heading_20_3">
      <style:text-properties fo:font-size="14pt" officeooo:rsid="0014e25c" officeooo:paragraph-rsid="0014e25c" style:font-size-asian="14pt" style:font-size-complex="14pt"/>
    </style:style>
    <style:style style:name="P19" style:family="paragraph" style:parent-style-name="Text_20_body">
      <style:text-properties fo:font-size="14pt" officeooo:rsid="0014e25c" style:font-size-asian="14pt" style:font-size-complex="14pt"/>
    </style:style>
    <style:style style:name="P20" style:family="paragraph" style:parent-style-name="Heading_20_3">
      <style:text-properties fo:font-size="14pt" officeooo:rsid="0014e25c" style:font-size-asian="14pt" style:font-size-complex="14pt"/>
    </style:style>
    <style:style style:name="P21" style:family="paragraph" style:parent-style-name="Text_20_body">
      <style:text-properties officeooo:paragraph-rsid="00176b64"/>
    </style:style>
    <style:style style:name="P22" style:family="paragraph" style:parent-style-name="Text_20_body">
      <style:paragraph-properties fo:line-height="100%"/>
      <style:text-properties fo:font-size="16pt" officeooo:rsid="0014e25c" officeooo:paragraph-rsid="00176b64" style:font-size-asian="16pt" style:font-size-complex="16pt"/>
    </style:style>
    <style:style style:name="P23" style:family="paragraph" style:parent-style-name="Text_20_body">
      <style:paragraph-properties fo:line-height="100%"/>
      <style:text-properties fo:font-size="16pt" officeooo:rsid="0014e25c" officeooo:paragraph-rsid="0019fe31" style:font-size-asian="16pt" style:font-size-complex="16pt"/>
    </style:style>
    <style:style style:name="P24" style:family="paragraph" style:parent-style-name="Heading_20_3">
      <style:text-properties fo:font-size="16pt" officeooo:rsid="0014e25c" officeooo:paragraph-rsid="00176b64" style:font-size-asian="16pt" style:font-size-complex="16pt"/>
    </style:style>
    <style:style style:name="P25" style:family="paragraph" style:parent-style-name="Text_20_body" style:list-style-name="L1">
      <style:paragraph-properties fo:margin-top="0in" fo:margin-bottom="0in" style:contextual-spacing="false" fo:line-height="115%"/>
      <style:text-properties fo:font-size="14pt" officeooo:rsid="0014e25c" style:font-size-asian="14pt" style:font-size-complex="14pt"/>
    </style:style>
    <style:style style:name="P26" style:family="paragraph" style:parent-style-name="Text_20_body" style:list-style-name="L1">
      <style:paragraph-properties fo:margin-top="0in" fo:margin-bottom="0in" style:contextual-spacing="false" fo:line-height="115%"/>
      <style:text-properties fo:font-size="14pt" officeooo:rsid="00187f6e" officeooo:paragraph-rsid="00187f6e" style:font-size-asian="14pt" style:font-size-complex="14pt"/>
    </style:style>
    <style:style style:name="P27" style:family="paragraph" style:parent-style-name="Standard" style:list-style-name="L1">
      <style:paragraph-properties fo:line-height="115%"/>
      <style:text-properties fo:font-size="14pt" fo:font-weight="normal" officeooo:rsid="001515cf" officeooo:paragraph-rsid="00187f6e" style:font-size-asian="14pt" style:font-weight-asian="normal" style:font-size-complex="14pt" style:font-weight-complex="normal"/>
    </style:style>
    <style:style style:name="P28" style:family="paragraph" style:parent-style-name="Standard" style:list-style-name="L1">
      <style:paragraph-properties fo:line-height="115%"/>
      <style:text-properties fo:font-size="14pt" officeooo:rsid="001515cf" officeooo:paragraph-rsid="00187f6e" style:font-size-asian="14pt" style:font-size-complex="14pt"/>
    </style:style>
    <style:style style:name="P29" style:family="paragraph" style:parent-style-name="Standard" style:list-style-name="L1">
      <style:paragraph-properties fo:line-height="115%"/>
      <style:text-properties fo:font-size="14pt" officeooo:rsid="00187f6e" officeooo:paragraph-rsid="00187f6e" style:font-size-asian="14pt" style:font-size-complex="14pt"/>
    </style:style>
    <style:style style:name="P30" style:family="paragraph" style:parent-style-name="Text_20_body" style:list-style-name="L1">
      <style:paragraph-properties fo:margin-top="0in" fo:margin-bottom="0in" style:contextual-spacing="false" fo:line-height="115%"/>
      <style:text-properties fo:font-size="14pt" officeooo:rsid="001515cf" officeooo:paragraph-rsid="00187f6e" style:font-size-asian="14pt" style:font-size-complex="14pt"/>
    </style:style>
    <style:style style:name="P31" style:family="paragraph" style:parent-style-name="Standard" style:list-style-name="L1">
      <style:text-properties fo:font-size="14pt" officeooo:rsid="001515cf" officeooo:paragraph-rsid="00187f6e" style:font-size-asian="14pt" style:font-size-complex="14pt"/>
    </style:style>
    <style:style style:name="P32" style:family="paragraph" style:parent-style-name="Standard">
      <style:text-properties fo:font-size="14pt" officeooo:rsid="001515cf" officeooo:paragraph-rsid="00187f6e" style:font-size-asian="14pt" style:font-size-complex="14pt"/>
    </style:style>
    <style:style style:name="P33" style:family="paragraph" style:parent-style-name="Standard">
      <style:text-properties fo:font-size="14pt" fo:font-weight="bold" officeooo:rsid="0016019f" officeooo:paragraph-rsid="00187f6e" style:font-size-asian="14pt" style:font-weight-asian="bold" style:font-size-complex="14pt" style:font-weight-complex="bold"/>
    </style:style>
    <style:style style:name="P34" style:family="paragraph" style:parent-style-name="Standard">
      <style:paragraph-properties fo:line-height="150%"/>
      <style:text-properties fo:font-size="18pt" fo:font-weight="bold" officeooo:rsid="0014e25c" officeooo:paragraph-rsid="0014e25c" style:font-size-asian="18pt" style:font-weight-asian="bold" style:font-size-complex="18pt" style:font-weight-complex="bold"/>
    </style:style>
    <style:style style:name="P35" style:family="paragraph" style:parent-style-name="Standard">
      <style:paragraph-properties fo:line-height="115%"/>
      <style:text-properties fo:font-size="16pt" officeooo:rsid="0014e25c" officeooo:paragraph-rsid="0014e25c" style:font-size-asian="16pt" style:font-size-complex="16pt"/>
    </style:style>
    <style:style style:name="P36" style:family="paragraph" style:parent-style-name="Heading_20_3">
      <style:text-properties fo:font-size="16pt" officeooo:rsid="0014e25c" style:font-size-asian="16pt" style:font-size-complex="16pt"/>
    </style:style>
    <style:style style:name="P37" style:family="paragraph" style:parent-style-name="Text_20_body" style:list-style-name="L2">
      <style:paragraph-properties fo:margin-top="0in" fo:margin-bottom="0in" style:contextual-spacing="false"/>
      <style:text-properties fo:font-size="16pt" officeooo:rsid="0014e25c" style:font-size-asian="16pt" style:font-size-complex="16pt"/>
    </style:style>
    <style:style style:name="P38" style:family="paragraph" style:parent-style-name="Text_20_body" style:list-style-name="L2">
      <style:text-properties fo:font-size="16pt" officeooo:rsid="0014e25c" style:font-size-asian="16pt" style:font-size-complex="16pt"/>
    </style:style>
    <style:style style:name="P39" style:family="paragraph" style:parent-style-name="Text_20_body" style:list-style-name="L3">
      <style:paragraph-properties fo:margin-top="0in" fo:margin-bottom="0in" style:contextual-spacing="false"/>
      <style:text-properties fo:font-size="14pt" officeooo:rsid="0014e25c" officeooo:paragraph-rsid="001a8c4a" style:font-size-asian="14pt" style:font-size-complex="14pt"/>
    </style:style>
    <style:style style:name="P40" style:family="paragraph" style:parent-style-name="Text_20_body" style:list-style-name="L3">
      <style:paragraph-properties fo:margin-top="0in" fo:margin-bottom="0in" style:contextual-spacing="false"/>
      <style:text-properties fo:font-size="14pt" officeooo:rsid="0014e25c" style:font-size-asian="14pt" style:font-size-complex="14pt"/>
    </style:style>
    <style:style style:name="P41" style:family="paragraph" style:parent-style-name="Text_20_body" style:list-style-name="L3">
      <style:paragraph-properties fo:margin-top="0in" fo:margin-bottom="0in" style:contextual-spacing="false"/>
      <style:text-properties fo:font-size="16pt" officeooo:rsid="0014e25c" style:font-size-asian="16pt" style:font-size-complex="16pt"/>
    </style:style>
    <style:style style:name="P42" style:family="paragraph" style:parent-style-name="Text_20_body" style:list-style-name="L3">
      <style:text-properties fo:font-size="16pt" officeooo:rsid="0014e25c" officeooo:paragraph-rsid="0021ddb7" style:font-size-asian="16pt" style:font-size-complex="16pt"/>
    </style:style>
    <style:style style:name="P43" style:family="paragraph" style:parent-style-name="Heading_20_3">
      <style:text-properties fo:font-size="16pt" fo:font-weight="bold" officeooo:rsid="0014e25c" officeooo:paragraph-rsid="0014e25c" style:font-size-asian="16pt" style:font-weight-asian="bold" style:font-size-complex="16pt" style:font-weight-complex="bold"/>
    </style:style>
    <style:style style:name="P44" style:family="paragraph" style:parent-style-name="Text_20_body">
      <style:text-properties fo:font-size="14pt" fo:font-weight="normal" officeooo:rsid="0014e25c" style:font-size-asian="14pt" style:font-weight-asian="normal" style:font-size-complex="14pt" style:font-weight-complex="normal"/>
    </style:style>
    <style:style style:name="P45" style:family="paragraph" style:parent-style-name="Text_20_body" style:list-style-name="L4">
      <style:paragraph-properties fo:margin-top="0in" fo:margin-bottom="0in" style:contextual-spacing="false"/>
      <style:text-properties fo:font-size="16pt" fo:font-weight="bold" officeooo:rsid="0014e25c" style:font-size-asian="16pt" style:font-weight-asian="bold" style:font-size-complex="16pt" style:font-weight-complex="bold"/>
    </style:style>
    <style:style style:name="P46" style:family="paragraph" style:parent-style-name="Text_20_body" style:list-style-name="L4">
      <style:text-properties fo:font-size="16pt" fo:font-weight="bold" officeooo:rsid="0014e25c" style:font-size-asian="16pt" style:font-weight-asian="bold" style:font-size-complex="16pt" style:font-weight-complex="bold"/>
    </style:style>
    <style:style style:name="P47" style:family="paragraph" style:parent-style-name="Text_20_body">
      <style:text-properties fo:font-size="14pt" fo:font-weight="bold" officeooo:rsid="0014e25c" style:font-size-asian="14pt" style:font-weight-asian="bold" style:font-size-complex="14pt" style:font-weight-complex="bold"/>
    </style:style>
    <style:style style:name="P48" style:family="paragraph" style:parent-style-name="Heading_20_3">
      <style:text-properties fo:font-size="14pt" fo:font-weight="bold" officeooo:rsid="0014e25c" style:font-size-asian="14pt" style:font-weight-asian="bold" style:font-size-complex="14pt" style:font-weight-complex="bold"/>
    </style:style>
    <style:style style:name="P49" style:family="paragraph" style:parent-style-name="Text_20_body" style:list-style-name="L5">
      <style:paragraph-properties fo:margin-top="0in" fo:margin-bottom="0in" style:contextual-spacing="false" fo:line-height="150%"/>
      <style:text-properties style:font-name="Liberation Serif" fo:font-size="14pt" fo:font-weight="normal" officeooo:rsid="0014e25c" style:font-size-asian="14pt" style:font-weight-asian="normal" style:font-size-complex="14pt" style:font-weight-complex="normal"/>
    </style:style>
    <style:style style:name="P50" style:family="paragraph" style:parent-style-name="Text_20_body" style:list-style-name="L5">
      <style:paragraph-properties fo:margin-top="0in" fo:margin-bottom="0in" style:contextual-spacing="false" fo:line-height="150%"/>
      <style:text-properties fo:font-size="14pt" fo:font-weight="bold" officeooo:rsid="0014e25c" style:font-size-asian="14pt" style:font-weight-asian="bold" style:font-size-complex="14pt" style:font-weight-complex="bold"/>
    </style:style>
    <style:style style:name="P51" style:family="paragraph" style:parent-style-name="Text_20_body" style:list-style-name="L5">
      <style:paragraph-properties fo:line-height="115%"/>
      <style:text-properties fo:font-size="14pt" fo:font-weight="normal" officeooo:rsid="0014e25c" style:font-size-asian="14pt" style:font-weight-asian="normal" style:font-size-complex="14pt" style:font-weight-complex="normal"/>
    </style:style>
    <style:style style:name="P52" style:family="paragraph" style:parent-style-name="Text_20_body" style:list-style-name="L5">
      <style:text-properties fo:font-size="14pt" fo:font-weight="normal" officeooo:rsid="001be542" officeooo:paragraph-rsid="001be542" style:font-size-asian="14pt" style:font-weight-asian="normal" style:font-size-complex="14pt" style:font-weight-complex="normal"/>
    </style:style>
    <style:style style:name="P53" style:family="paragraph" style:parent-style-name="Standard">
      <style:text-properties fo:font-size="14pt" fo:font-weight="normal" officeooo:rsid="0014e25c" officeooo:paragraph-rsid="0014e25c" style:font-size-asian="14pt" style:font-weight-asian="normal" style:font-size-complex="14pt" style:font-weight-complex="normal"/>
    </style:style>
    <style:style style:name="P54" style:family="paragraph" style:parent-style-name="Heading_20_3">
      <style:text-properties fo:font-size="16pt" officeooo:rsid="0014e25c" officeooo:paragraph-rsid="0014e25c" style:font-size-asian="16pt" style:font-size-complex="16pt"/>
    </style:style>
    <style:style style:name="P55" style:family="paragraph" style:parent-style-name="Text_20_body" style:list-style-name="L6">
      <style:paragraph-properties fo:margin-top="0in" fo:margin-bottom="0in" style:contextual-spacing="false"/>
      <style:text-properties fo:font-size="16pt" officeooo:rsid="0014e25c" style:font-size-asian="16pt" style:font-size-complex="16pt"/>
    </style:style>
    <style:style style:name="P56" style:family="paragraph" style:parent-style-name="Text_20_body" style:list-style-name="L6">
      <style:text-properties fo:font-size="16pt" officeooo:rsid="0014e25c" style:font-size-asian="16pt" style:font-size-complex="16pt"/>
    </style:style>
    <style:style style:name="P57" style:family="paragraph" style:parent-style-name="Text_20_body" style:list-style-name="L7">
      <style:paragraph-properties fo:margin-top="0in" fo:margin-bottom="0in" style:contextual-spacing="false"/>
      <style:text-properties fo:font-size="16pt" officeooo:rsid="0014e25c" style:font-size-asian="16pt" style:font-size-complex="16pt"/>
    </style:style>
    <style:style style:name="P58" style:family="paragraph" style:parent-style-name="Text_20_body" style:list-style-name="L7">
      <style:paragraph-properties fo:margin-top="0in" fo:margin-bottom="0in" style:contextual-spacing="false"/>
      <style:text-properties style:font-name="Liberation Serif" fo:font-size="14pt" officeooo:rsid="0014e25c" style:font-size-asian="14pt" style:font-size-complex="14pt"/>
    </style:style>
    <style:style style:name="P59" style:family="paragraph" style:parent-style-name="Text_20_body" style:list-style-name="L7">
      <style:paragraph-properties fo:line-height="100%"/>
      <style:text-properties style:font-name="Liberation Serif" fo:font-size="14pt" officeooo:rsid="0014e25c" officeooo:paragraph-rsid="001e5cd3" style:font-size-asian="14pt" style:font-size-complex="14pt"/>
    </style:style>
    <style:style style:name="P60" style:family="paragraph" style:parent-style-name="Text_20_body" style:list-style-name="L7">
      <style:paragraph-properties fo:line-height="100%"/>
      <style:text-properties fo:font-size="14pt" officeooo:rsid="0014e25c" officeooo:paragraph-rsid="001e80e4" style:font-size-asian="14pt" style:font-size-complex="14pt"/>
    </style:style>
    <style:style style:name="P61" style:family="paragraph" style:parent-style-name="Text_20_body" style:list-style-name="L7">
      <style:paragraph-properties fo:line-height="100%"/>
      <style:text-properties fo:font-size="14pt" officeooo:rsid="0014e25c" style:font-size-asian="14pt" style:font-size-complex="14pt"/>
    </style:style>
    <style:style style:name="P62" style:family="paragraph" style:parent-style-name="Text_20_body" style:list-style-name="L7">
      <style:paragraph-properties fo:line-height="100%"/>
      <style:text-properties style:font-name="Liberation Serif" fo:font-size="14pt" officeooo:rsid="0014e25c" style:font-size-asian="14pt" style:font-size-complex="14pt"/>
    </style:style>
    <style:style style:name="P63" style:family="paragraph" style:parent-style-name="Text_20_body" style:list-style-name="L7">
      <style:paragraph-properties fo:line-height="100%"/>
      <style:text-properties style:font-name="Liberation Serif" fo:font-size="14pt" officeooo:rsid="001e5cd3" officeooo:paragraph-rsid="001e5cd3" style:font-size-asian="14pt" style:font-size-complex="14pt"/>
    </style:style>
    <style:style style:name="P64" style:family="paragraph" style:parent-style-name="Text_20_body">
      <style:text-properties fo:font-size="16pt" officeooo:rsid="0014e25c" style:font-size-asian="16pt" style:font-size-complex="16pt"/>
    </style:style>
    <style:style style:name="P65" style:family="paragraph" style:parent-style-name="Standard">
      <style:text-properties fo:font-size="16pt" fo:font-weight="bold" officeooo:rsid="0014e25c" officeooo:paragraph-rsid="0014e25c" style:font-size-asian="16pt" style:font-weight-asian="bold" style:font-size-complex="16pt" style:font-weight-complex="bold"/>
    </style:style>
    <style:style style:name="P66" style:family="paragraph" style:parent-style-name="Heading_20_3">
      <style:text-properties fo:font-size="14pt" fo:font-weight="normal" officeooo:rsid="0014e25c" officeooo:paragraph-rsid="0014e25c" style:font-size-asian="12.25pt" style:font-weight-asian="normal" style:font-size-complex="14pt" style:font-weight-complex="normal"/>
    </style:style>
    <style:style style:name="P67" style:family="paragraph" style:parent-style-name="Text_20_body">
      <style:text-properties fo:font-size="14pt" officeooo:rsid="0014e25c" style:font-size-asian="12.25pt" style:font-size-complex="14pt"/>
    </style:style>
    <style:style style:name="P68" style:family="paragraph" style:parent-style-name="Heading_20_3">
      <style:text-properties officeooo:rsid="0014e25c" style:font-size-asian="12.25pt"/>
    </style:style>
    <style:style style:name="P69" style:family="paragraph" style:parent-style-name="Text_20_body" style:list-style-name="L8">
      <style:paragraph-properties fo:margin-top="0in" fo:margin-bottom="0in" style:contextual-spacing="false"/>
      <style:text-properties fo:font-size="14pt" officeooo:rsid="0014e25c" style:font-size-asian="12.25pt" style:font-size-complex="14pt"/>
    </style:style>
    <style:style style:name="P70" style:family="paragraph" style:parent-style-name="Text_20_body" style:list-style-name="L8">
      <style:text-properties fo:font-size="14pt" officeooo:rsid="0014e25c" style:font-size-asian="12.25pt" style:font-size-complex="14pt"/>
    </style:style>
    <style:style style:name="P71" style:family="paragraph" style:parent-style-name="Text_20_body" style:list-style-name="L9">
      <style:paragraph-properties fo:margin-top="0in" fo:margin-bottom="0in" style:contextual-spacing="false"/>
      <style:text-properties style:font-name="Liberation Serif" fo:font-size="14pt" officeooo:rsid="0014e25c" style:font-size-asian="12.25pt" style:font-size-complex="14pt"/>
    </style:style>
    <style:style style:name="P72" style:family="paragraph" style:parent-style-name="Text_20_body" style:list-style-name="L9">
      <style:paragraph-properties fo:margin-top="0in" fo:margin-bottom="0in" style:contextual-spacing="false"/>
      <style:text-properties fo:font-size="14pt" officeooo:rsid="0014e25c" style:font-size-asian="12.25pt" style:font-size-complex="14pt"/>
    </style:style>
    <style:style style:name="P73" style:family="paragraph" style:parent-style-name="Text_20_body" style:list-style-name="L9">
      <style:paragraph-properties fo:margin-top="0in" fo:margin-bottom="0in" style:contextual-spacing="false"/>
      <style:text-properties style:font-name="Liberation Serif" fo:font-size="14pt" officeooo:rsid="0020f237" officeooo:paragraph-rsid="0020f237" style:font-size-asian="12.25pt" style:font-size-complex="14pt"/>
    </style:style>
    <style:style style:name="P74" style:family="paragraph" style:parent-style-name="Text_20_body" style:list-style-name="L9">
      <style:paragraph-properties fo:line-height="100%"/>
    </style:style>
    <style:style style:name="P75" style:family="paragraph" style:parent-style-name="Text_20_body" style:list-style-name="L9">
      <style:paragraph-properties fo:margin-top="0in" fo:margin-bottom="0in" style:contextual-spacing="false" fo:line-height="100%"/>
      <style:text-properties fo:font-size="14pt" officeooo:rsid="0014e25c" style:font-size-asian="12.25pt" style:font-size-complex="14pt"/>
    </style:style>
    <style:style style:name="P76" style:family="paragraph" style:parent-style-name="Text_20_body" style:list-style-name="L9">
      <style:text-properties fo:font-size="14pt" officeooo:rsid="0014e25c" style:font-size-asian="12.25pt" style:font-size-complex="14pt"/>
    </style:style>
    <style:style style:name="P77" style:family="paragraph" style:parent-style-name="Standard">
      <style:text-properties fo:font-size="14pt" fo:font-weight="normal" officeooo:rsid="0014e25c" officeooo:paragraph-rsid="0014e25c" style:font-size-asian="12.25pt" style:font-weight-asian="normal" style:font-size-complex="14pt" style:font-weight-complex="normal"/>
    </style:style>
    <style:style style:name="P78" style:family="paragraph" style:parent-style-name="Standard">
      <style:text-properties fo:font-size="16pt" fo:font-weight="bold" officeooo:rsid="002560bf" officeooo:paragraph-rsid="002560bf" style:font-size-asian="16pt" style:font-weight-asian="bold" style:font-size-complex="16pt" style:font-weight-complex="bold"/>
    </style:style>
    <style:style style:name="P79" style:family="paragraph" style:parent-style-name="Standard">
      <style:text-properties fo:font-size="20pt" fo:font-weight="bold" officeooo:rsid="0020f237" officeooo:paragraph-rsid="0020f237" style:font-size-asian="20pt" style:font-weight-asian="bold" style:font-size-complex="20pt" style:font-weight-complex="bold"/>
    </style:style>
    <style:style style:name="P80" style:family="paragraph" style:parent-style-name="Standard">
      <style:paragraph-properties fo:margin-top="0in" fo:margin-bottom="0.1965in" style:contextual-spacing="false"/>
      <style:text-properties fo:font-size="14pt" officeooo:paragraph-rsid="0020f237" style:font-size-asian="14pt" style:font-size-complex="14pt"/>
    </style:style>
    <style:style style:name="P81" style:family="paragraph" style:parent-style-name="Text_20_body">
      <style:text-properties fo:font-size="14pt" officeooo:paragraph-rsid="0020f237" style:font-size-asian="14pt" style:font-size-complex="14pt"/>
    </style:style>
    <style:style style:name="P82" style:family="paragraph" style:parent-style-name="Text_20_body" style:list-style-name="L10">
      <style:text-properties fo:font-size="14pt" style:font-size-asian="14pt" style:font-size-complex="14pt"/>
    </style:style>
    <style:style style:name="P83" style:family="paragraph" style:parent-style-name="Text_20_body">
      <style:text-properties fo:font-size="14pt" style:font-size-asian="14pt" style:font-size-complex="14pt"/>
    </style:style>
    <style:style style:name="P84" style:family="paragraph" style:parent-style-name="Text_20_body">
      <style:text-properties fo:font-size="14pt" fo:font-weight="bold" officeooo:rsid="0021ddb7" officeooo:paragraph-rsid="0021ddb7" style:font-size-asian="14pt" style:font-weight-asian="bold" style:font-size-complex="14pt" style:font-weight-complex="bold"/>
    </style:style>
    <style:style style:name="P85" style:family="paragraph" style:parent-style-name="Text_20_body" style:list-style-name="L11">
      <style:text-properties fo:font-size="14pt" officeooo:rsid="0021ddb7" officeooo:paragraph-rsid="0021ddb7" style:font-size-asian="14pt" style:font-size-complex="14pt"/>
    </style:style>
    <style:style style:name="P86" style:family="paragraph" style:parent-style-name="Text_20_body">
      <style:text-properties fo:font-size="14pt" officeooo:rsid="0021ddb7" officeooo:paragraph-rsid="0021ddb7" style:font-size-asian="14pt" style:font-size-complex="14pt"/>
    </style:style>
    <style:style style:name="P87" style:family="paragraph" style:parent-style-name="Text_20_body">
      <style:text-properties fo:font-size="14pt" officeooo:rsid="00249f32" officeooo:paragraph-rsid="00249f32" style:font-size-asian="14pt" style:font-size-complex="14pt"/>
    </style:style>
    <style:style style:name="T1" style:family="text">
      <style:text-properties fo:font-size="14pt" fo:font-weight="normal" style:font-weight-asian="normal" style:font-size-complex="14pt" style:font-weight-complex="normal"/>
    </style:style>
    <style:style style:name="T2" style:family="text">
      <style:text-properties fo:font-weight="bold" style:font-weight-asian="bold" style:font-weight-complex="bold"/>
    </style:style>
    <style:style style:name="T3" style:family="text">
      <style:text-properties officeooo:rsid="0016019f"/>
    </style:style>
    <style:style style:name="T4" style:family="text">
      <style:text-properties fo:font-weight="bold" officeooo:rsid="0016019f" style:font-weight-asian="bold" style:font-weight-complex="bold"/>
    </style:style>
    <style:style style:name="T5" style:family="text">
      <style:text-properties fo:font-size="14pt" fo:font-weight="normal" officeooo:rsid="00176b64" style:font-size-asian="12.25pt" style:font-weight-asian="normal" style:font-size-complex="14pt" style:font-weight-complex="normal"/>
    </style:style>
    <style:style style:name="T6" style:family="text">
      <style:text-properties fo:font-size="14pt" fo:font-weight="bold" officeooo:rsid="00176b64" style:font-size-asian="12.25pt" style:font-weight-asian="bold" style:font-size-complex="14pt" style:font-weight-complex="bold"/>
    </style:style>
    <style:style style:name="T7" style:family="text">
      <style:text-properties fo:font-size="16pt" fo:font-weight="bold" officeooo:rsid="0014e25c" style:font-size-asian="16pt" style:font-weight-asian="bold" style:font-size-complex="16pt" style:font-weight-complex="bold"/>
    </style:style>
    <style:style style:name="T8" style:family="text">
      <style:text-properties fo:font-size="14pt" fo:font-weight="bold" officeooo:rsid="0025a777" style:font-size-asian="12.25pt" style:font-weight-asian="bold" style:font-size-complex="14pt" style:font-weight-complex="bold"/>
    </style:style>
    <style:style style:name="T9" style:family="text">
      <style:text-properties fo:font-size="16pt" fo:font-weight="bold" officeooo:rsid="0025a777" style:font-size-asian="16pt" style:font-weight-asian="bold" style:font-size-complex="16pt" style:font-weight-complex="bold"/>
    </style:style>
    <style:style style:name="T10" style:family="text">
      <style:text-properties fo:font-size="16pt" fo:font-weight="normal" officeooo:rsid="00176b64" style:font-size-asian="16pt" style:font-weight-asian="normal" style:font-size-complex="16pt" style:font-weight-complex="normal"/>
    </style:style>
    <style:style style:name="T11" style:family="text">
      <style:text-properties fo:font-size="14pt" fo:font-weight="normal" officeooo:rsid="0014e25c" style:font-size-asian="14pt" style:font-weight-asian="normal" style:font-size-complex="14pt" style:font-weight-complex="normal"/>
    </style:style>
    <style:style style:name="T12" style:family="text">
      <style:text-properties fo:font-size="14pt" fo:font-weight="normal" officeooo:rsid="00176b64" style:font-size-asian="14pt" style:font-weight-asian="normal" style:font-size-complex="14pt" style:font-weight-complex="normal"/>
    </style:style>
    <style:style style:name="T13" style:family="text">
      <style:text-properties fo:font-size="14pt" officeooo:rsid="0014e25c" style:font-size-asian="14pt" style:font-size-complex="14pt"/>
    </style:style>
    <style:style style:name="T14" style:family="text">
      <style:text-properties fo:font-size="14pt" officeooo:rsid="00176b64" style:font-size-asian="14pt" style:font-size-complex="14pt"/>
    </style:style>
    <style:style style:name="T15" style:family="text">
      <style:text-properties fo:font-size="14pt" fo:font-weight="bold" officeooo:rsid="00176b64" style:font-size-asian="14pt" style:font-weight-asian="bold" style:font-size-complex="14pt" style:font-weight-complex="bold"/>
    </style:style>
    <style:style style:name="T16" style:family="text">
      <style:text-properties fo:font-size="14pt" style:font-size-asian="14pt" style:font-size-complex="14pt"/>
    </style:style>
    <style:style style:name="T17" style:family="text">
      <style:text-properties fo:font-size="14pt" fo:font-weight="normal" officeooo:rsid="00187f6e" style:font-size-asian="14pt" style:font-weight-asian="normal" style:font-size-complex="14pt" style:font-weight-complex="normal"/>
    </style:style>
    <style:style style:name="T18" style:family="text">
      <style:text-properties officeooo:rsid="00176b64"/>
    </style:style>
    <style:style style:name="T19" style:family="text">
      <style:text-properties fo:font-weight="normal" officeooo:rsid="001515cf" style:font-weight-asian="normal" style:font-weight-complex="normal"/>
    </style:style>
    <style:style style:name="T20" style:family="text">
      <style:text-properties officeooo:rsid="0019fe31"/>
    </style:style>
    <style:style style:name="T21" style:family="text">
      <style:text-properties officeooo:rsid="00187f6e"/>
    </style:style>
    <style:style style:name="T22" style:family="text">
      <style:text-properties officeooo:rsid="001a8802"/>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bold" style:font-weight-asian="bold" style:font-weight-complex="bold"/>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fo:font-weight="normal" officeooo:rsid="0021ddb7" style:font-size-asian="14pt" style:font-weight-asian="normal" style:font-size-complex="14pt" style:font-weight-complex="normal"/>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font-weight="normal" officeooo:rsid="0021ddb7" style:font-size-asian="14pt" style:font-weight-asian="normal" style:font-size-complex="14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style:font-name="Liberation Serif" fo:font-weight="normal" officeooo:rsid="001be542" style:font-weight-asian="normal" style:font-weight-complex="normal"/>
    </style:style>
    <style:style style:name="T31" style:family="text">
      <style:text-properties officeooo:rsid="001c9571"/>
    </style:style>
    <style:style style:name="T32" style:family="text">
      <style:text-properties fo:font-weight="normal" style:font-weight-asian="normal" style:font-weight-complex="normal"/>
    </style:style>
    <style:style style:name="T33" style:family="text">
      <style:text-properties officeooo:rsid="001e80e4"/>
    </style:style>
    <style:style style:name="T34" style:family="text">
      <style:text-properties officeooo:rsid="001e5cd3"/>
    </style:style>
    <style:style style:name="T35" style:family="text">
      <style:text-properties style:font-name="Liberation Serif" officeooo:rsid="001e80e4"/>
    </style:style>
    <style:style style:name="T36" style:family="text">
      <style:text-properties style:font-name="Liberation Serif"/>
    </style:style>
    <style:style style:name="T37" style:family="text">
      <style:text-properties style:font-name="Liberation Serif" officeooo:rsid="001e5cd3"/>
    </style:style>
    <style:style style:name="T38" style:family="text">
      <style:text-properties officeooo:rsid="001f5dc5"/>
    </style:style>
    <style:style style:name="T39" style:family="text">
      <style:text-properties officeooo:rsid="0020f237"/>
    </style:style>
    <style:style style:name="T40" style:family="text">
      <style:text-properties fo:font-size="14pt" officeooo:rsid="0020f237" style:font-size-asian="14pt" style:font-size-complex="14pt"/>
    </style:style>
    <style:style style:name="T41" style:family="text">
      <style:text-properties fo:font-size="14pt" fo:font-weight="normal" style:font-size-asian="12.25pt" style:font-weight-asian="normal" style:font-size-complex="14pt" style:font-weight-complex="normal"/>
    </style:style>
    <style:style style:name="T42" style:family="text">
      <style:text-properties officeooo:rsid="002560bf"/>
    </style:style>
    <style:style style:name="T43" style:family="text">
      <style:text-properties officeooo:rsid="00224528"/>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 MODULES FOR REALLIST &amp; KARUTHU.AI</text:p>
      <text:p text:style-name="P2">DOCUMENTATION</text:p>
      <text:p text:style-name="P3"/>
      <text:p text:style-name="P4">Github Link : <text:s/><text:span text:style-name="T1">https://github.com/azar011/AI_MODULES.git</text:span></text:p>
      <text:p text:style-name="P3"/>
      <text:p text:style-name="P3"/>
      <text:p text:style-name="P5"><text:span text:style-name="T2">1.</text:span> <text:span text:style-name="T2">Voice Recognition :-</text:span></text:p>
      <text:p text:style-name="P6"/>
      <text:p text:style-name="P7"><text:span text:style-name="T2">Purpose :-</text:span></text:p>
      <text:p text:style-name="P8">This document defines the hardware infrastructure requirements for deploying a Voice Assistant system that converts Native speech into English text using the Faster-Whisper Large-v3 model. The solution is intended for enterprise environments requiring high transcription accuracy, scalability, reliability, and support for concurrent users.</text:p>
      <text:p text:style-name="P9"/>
      <text:p text:style-name="P9"/>
      <text:p text:style-name="P10">Solution Overview :-</text:p>
      <text:p text:style-name="P11">The voice assistant captures native language audio from users, processes the audio using the Faster-Whisper Large-v3 model, and returns English text output through backend APIs.</text:p>
      <text:p text:style-name="P9"/>
      <text:p text:style-name="P12">API Endpoints :-</text:p>
      <text:p text:style-name="P13">1. <text:s/><text:span text:style-name="T2">/translate </text:span><text:s/>- <text:s/>It gets the user audio file and returns the task id for each user <text:s/><text:span text:style-name="T3">[</text:span><text:span text:style-name="T4">POST</text:span><text:span text:style-name="T3">]</text:span></text:p>
      <text:p text:style-name="P13">2. <text:s/><text:span text:style-name="T2">/status/{task_id}</text:span> – It gives the Output of recognized Text in the audio <text:s/><text:span text:style-name="T3">[</text:span><text:span text:style-name="T4">GET</text:span><text:span text:style-name="T3">]</text:span></text:p>
      <text:p text:style-name="P9"/>
      <text:p text:style-name="P9"/>
      <text:p text:style-name="P14">How to run :-</text:p>
      <text:p text:style-name="P15">1. Open folder in vs code </text:p>
      <text:p text:style-name="P15">2. Open backend folder in Terminal</text:p>
      <text:p text:style-name="P15">3. cmd - python -m venv venv</text:p>
      <text:p text:style-name="P15">4. cmd - venv/Scripts/activate </text:p>
      <text:p text:style-name="P16">5. cmd - pip install -r requirements.txt</text:p>
      <text:p text:style-name="P16">6. python run.py</text:p>
      <text:p text:style-name="P16">7. Open another terminal run cmd - celery -A app.tasks worker --pool=threads --</text:p>
      <text:p text:style-name="P16"><text:s text:c="4"/>concurrency=2 --loglevel=info</text:p>
      <text:p text:style-name="P16"/>
      <text:p text:style-name="P16">{ =&gt; Ensure that python , pip <text:span text:style-name="T3">and redis server </text:span>have been installed in your system }</text:p>
      <text:p text:style-name="P9"/>
      <text:p text:style-name="P17"/>
      <text:p text:style-name="P17"><text:soft-page-break/>2. CAPA Recommendation :-</text:p>
      <text:h text:style-name="P18" text:outline-level="3">Purpose :-</text:h>
      <text:p text:style-name="P19">The s<text:span text:style-name="T3">ystem</text:span> uses semantic search with embeddings and a vector database to retrieve the most relevant historical CAPA records based on user issues. It is designed for enterprise environments requiring high search accuracy, low response time, scalability, reliability, and support for concurrent users.</text:p>
      <text:h text:style-name="P20" text:outline-level="3">Solution Overview :-</text:h>
      <text:p text:style-name="P19">The CAPA Recommendation System receives an issue description from the user, converts the text into embeddings using a Sentence Transformer model, searches similar historical CAPA records stored in Qdrant Vector Database, and returns the most relevant Corrective Actions, Root Causes, and Preventive Actions through backend APIs.</text:p>
      <text:h text:style-name="P20" text:outline-level="3">API Endpoints :-</text:h>
      <text:p text:style-name="P21"><text:span text:style-name="Strong_20_Emphasis"><text:span text:style-name="T5">1.</text:span></text:span><text:span text:style-name="Strong_20_Emphasis"><text:span text:style-name="T6"> /</text:span></text:span><text:span text:style-name="Strong_20_Emphasis"><text:span text:style-name="T7">g</text:span></text:span><text:span text:style-name="Strong_20_Emphasis"><text:span text:style-name="T8">enerate/cap</text:span></text:span><text:span text:style-name="Strong_20_Emphasis"><text:span text:style-name="T9">a</text:span></text:span><text:span text:style-name="Strong_20_Emphasis"><text:span text:style-name="T6"> </text:span></text:span><text:span text:style-name="Strong_20_Emphasis"><text:span text:style-name="T10">-</text:span></text:span><text:span text:style-name="T11"> </text:span><text:span text:style-name="T12">Gets the data from the user and returns the task_id . </text:span><text:span text:style-name="Strong_20_Emphasis"><text:span text:style-name="T13">[POST] </text:span></text:span></text:p>
      <text:p text:style-name="P22"><text:span text:style-name="T14">2. </text:span><text:span text:style-name="T15">/status/{task_id}</text:span><text:span text:style-name="T16"> <text:s/>- </text:span><text:span text:style-name="T14">R</text:span><text:span text:style-name="T16">eturns the most relevant CAPA recommendations based on</text:span></text:p>
      <text:p text:style-name="P22"><text:span text:style-name="T16"><text:s text:c="36"/>semantic similarity. </text:span><text:span text:style-name="Strong_20_Emphasis"><text:span text:style-name="T16">[</text:span></text:span><text:span text:style-name="Strong_20_Emphasis"><text:span text:style-name="T14">GET</text:span></text:span><text:span text:style-name="Strong_20_Emphasis"><text:span text:style-name="T16">]</text:span></text:span></text:p>
      <text:p text:style-name="P23"><text:span text:style-name="Strong_20_Emphasis"><text:span text:style-name="T12">3. </text:span></text:span><text:span text:style-name="Strong_20_Emphasis"><text:span text:style-name="T15">/save-capa </text:span></text:span><text:span text:style-name="Strong_20_Emphasis"><text:span text:style-name="T12"><text:s/>- If user Writes the new capa it will stored in the </text:span></text:span><text:span text:style-name="Strong_20_Emphasis"><text:span text:style-name="T17">vector </text:span></text:span><text:span text:style-name="Strong_20_Emphasis"><text:span text:style-name="T12">database. </text:span></text:span><text:span text:style-name="Strong_20_Emphasis"><text:span text:style-name="T16">[POST] </text:span></text:span></text:p>
      <text:h text:style-name="P24" text:outline-level="3">How to Run :-</text:h>
      <text:list text:style-name="L1">
        <text:list-item>
          <text:p text:style-name="P25"><text:span text:style-name="T18">Ensure that Qdrant installed locally.</text:span> </text:p>
        </text:list-item>
        <text:list-item>
          <text:p text:style-name="P26">Ensure that redis have been installed and running.</text:p>
        </text:list-item>
        <text:list-item>
          <text:p text:style-name="P26">Open CAPA recommendation folder in vs code.</text:p>
        </text:list-item>
        <text:list-item>
          <text:p text:style-name="P26">Open backend folder in terminal </text:p>
        </text:list-item>
        <text:list-item>
          <text:p text:style-name="P26">cmd - <text:span text:style-name="T19"><text:s/>python -m venv venv</text:span></text:p>
        </text:list-item>
        <text:list-item>
          <text:p text:style-name="P27">cmd - venv/Scripts/activate </text:p>
        </text:list-item>
        <text:list-item>
          <text:p text:style-name="P28">cmd - pip install -r requirements.txt</text:p>
        </text:list-item>
        <text:list-item>
          <text:p text:style-name="P29">Add CAPA historical data in ‘ capa_backend/app/data.escalations.json ‘</text:p>
        </text:list-item>
        <text:list-item>
          <text:p text:style-name="P29">Change the Open ai API key in .env file .</text:p>
        </text:list-item>
        <text:list-item>
          <text:p text:style-name="P30"><text:s/>python run.py</text:p>
        </text:list-item>
        <text:list-item>
          <text:p text:style-name="P31">Open another terminal run cmd - celery -A app.tasks worker --pool=threads -- <text:s text:c="4"/></text:p>
          <text:p text:style-name="P31">concurrency=2 --loglevel=info</text:p>
        </text:list-item>
      </text:list>
      <text:p text:style-name="P32"/>
      <text:p text:style-name="P32">{ <text:span text:style-name="T20">=</text:span>&gt; Ensure that python , pip , <text:span text:style-name="T3">redis server , </text:span><text:span text:style-name="T21">Qdrant </text:span>have been installed in your system }</text:p>
      <text:p text:style-name="P33"/>
      <text:p text:style-name="P34"><text:soft-page-break/>3. Escalation Count Prediction :-</text:p>
      <text:p text:style-name="P35"><text:span text:style-name="T16"><text:s/></text:span><text:span text:style-name="Strong_20_Emphasis"><text:span text:style-name="T16">Purpose :-</text:span></text:span></text:p>
      <text:p text:style-name="P19">This document defines the software infrastructure requirements for deploying an Escalation Count Prediction system that predicts the expected number of escalations using historical escalation data. </text:p>
      <text:h text:style-name="P36" text:outline-level="3"><text:span text:style-name="Strong_20_Emphasis"><text:span text:style-name="T16">Solution Overview :-</text:span></text:span></text:h>
      <text:p text:style-name="P19">The Escalation Count Prediction System receives the hierarchy details (Building, Floor, Department, or Zone) from the user, retrieves the historical escalation records from the database, analyzes previous escalation trends, predicts the expected escalation count, and returns the prediction through backend APIs.</text:p>
      <text:h text:style-name="P36" text:outline-level="3"><text:span text:style-name="Strong_20_Emphasis"><text:span text:style-name="T16">API Endpoints :-</text:span></text:span></text:h>
      <text:list text:style-name="L2">
        <text:list-item>
          <text:p text:style-name="P37"><text:span text:style-name="Strong_20_Emphasis"><text:span text:style-name="T16">/predict</text:span></text:span><text:span text:style-name="T16"> - Gets the hierarchy details from the user and returns the predicted escalation count. </text:span><text:span text:style-name="Strong_20_Emphasis"><text:span text:style-name="T16">[GET]</text:span></text:span><text:span text:style-name="T16"> </text:span></text:p>
        </text:list-item>
        <text:list-item>
          <text:p text:style-name="P37"><text:span text:style-name="Strong_20_Emphasis"><text:span text:style-name="T16">/buildings</text:span></text:span><text:span text:style-name="T16"> - Returns the available building list. </text:span><text:span text:style-name="Strong_20_Emphasis"><text:span text:style-name="T16">[GET]</text:span></text:span><text:span text:style-name="T16"> </text:span></text:p>
        </text:list-item>
        <text:list-item>
          <text:p text:style-name="P37"><text:span text:style-name="Strong_20_Emphasis"><text:span text:style-name="T16">/floors</text:span></text:span><text:span text:style-name="T16"> - Returns the available floors based on the selected building. </text:span><text:span text:style-name="Strong_20_Emphasis"><text:span text:style-name="T16">[GET]</text:span></text:span><text:span text:style-name="T16"> </text:span></text:p>
        </text:list-item>
        <text:list-item>
          <text:p text:style-name="P37"><text:span text:style-name="Strong_20_Emphasis"><text:span text:style-name="T16">/departments</text:span></text:span><text:span text:style-name="T16"> - Returns the available departments based on the selected building and floor. </text:span><text:span text:style-name="Strong_20_Emphasis"><text:span text:style-name="T16">[GET]</text:span></text:span><text:span text:style-name="T16"> </text:span></text:p>
        </text:list-item>
        <text:list-item>
          <text:p text:style-name="P38"><text:span text:style-name="Strong_20_Emphasis"><text:span text:style-name="T16">/zones</text:span></text:span><text:span text:style-name="T16"> - Returns the available zones based on the selected building, floor, and department. </text:span><text:span text:style-name="Strong_20_Emphasis"><text:span text:style-name="T16">[GET]</text:span></text:span><text:span text:style-name="T16"> </text:span></text:p>
        </text:list-item>
      </text:list>
      <text:h text:style-name="P36" text:outline-level="3"><text:span text:style-name="Strong_20_Emphasis"><text:span text:style-name="T16">How to Run :-</text:span></text:span></text:h>
      <text:list text:style-name="L3">
        <text:list-item>
          <text:p text:style-name="P39">Ensure that MySQL has been installed locally <text:span text:style-name="T22">and running.</text:span></text:p>
        </text:list-item>
        <text:list-item>
          <text:p text:style-name="P39"><text:span text:style-name="T23">Create a new database named </text:span><text:span text:style-name="Strong_20_Emphasis"><text:span text:style-name="Source_20_Text"><text:span text:style-name="T24">escalation_ml_db</text:span></text:span></text:span><text:span text:style-name="T24">.</text:span><text:span text:style-name="T23"> Import the SQL file </text:span><text:span text:style-name="Strong_20_Emphasis"><text:span text:style-name="Source_20_Text"><text:span text:style-name="T23">escalations_ml.sql</text:span></text:span></text:span><text:span text:style-name="T23"> into the </text:span><text:span text:style-name="Strong_20_Emphasis"><text:span text:style-name="Source_20_Text"><text:span text:style-name="T23">escalation_ml_db</text:span></text:span></text:span><text:span text:style-name="T23"> database. </text:span></text:p>
        </text:list-item>
        <text:list-item>
          <text:p text:style-name="P40">Open the Escalation Count Prediction folder in VS Code. </text:p>
        </text:list-item>
        <text:list-item>
          <text:p text:style-name="P40">Open the backend folder in Terminal. </text:p>
        </text:list-item>
        <text:list-item>
          <text:p text:style-name="P41"><text:span text:style-name="T16">cmd - </text:span><text:span text:style-name="Source_20_Text"><text:span text:style-name="T25">python -m venv venv</text:span></text:span><text:span text:style-name="T25"> </text:span></text:p>
        </text:list-item>
        <text:list-item>
          <text:p text:style-name="P41"><text:span text:style-name="T16">cmd - </text:span><text:span text:style-name="Source_20_Text"><text:span text:style-name="T25">venv/Scripts/activate</text:span></text:span><text:span text:style-name="T25"> </text:span></text:p>
        </text:list-item>
        <text:list-item>
          <text:p text:style-name="P41"><text:span text:style-name="T16">cmd - </text:span><text:span text:style-name="Source_20_Text"><text:span text:style-name="T25">pip install -r requirements.txt</text:span></text:span><text:span text:style-name="T25"> </text:span></text:p>
        </text:list-item>
        <text:list-item>
          <text:p text:style-name="P40">Import the historical escalation database into MySQL. </text:p>
        </text:list-item>
        <text:list-item>
          <text:p text:style-name="P40">Update the MySQL database credentials in the configuration file. </text:p>
        </text:list-item>
        <text:list-item>
          <text:p text:style-name="P42"><text:span text:style-name="T16">cmd - </text:span><text:span text:style-name="Source_20_Text"><text:span text:style-name="T25">python run.py</text:span></text:span><text:span text:style-name="T25"> <text:s text:c="86"/></text:span></text:p>
          <text:p text:style-name="P42"><text:span text:style-name="Strong_20_Emphasis"><text:span text:style-name="T26">{</text:span></text:span><text:span text:style-name="Strong_20_Emphasis"><text:span text:style-name="T27">Ensure that Python, pip, and MySQL Server have been installed in your system.</text:span></text:span><text:span text:style-name="Strong_20_Emphasis"><text:span text:style-name="T28">}</text:span></text:span><text:span text:style-name="Strong_20_Emphasis"><text:span text:style-name="T27"> </text:span></text:span></text:p>
        </text:list-item>
      </text:list>
      <text:p text:style-name="P34"><text:soft-page-break/>4. DPR Analysis :-</text:p>
      <text:h text:style-name="P43" text:outline-level="3"><text:span text:style-name="Strong_20_Emphasis"><text:span text:style-name="T29">Purpose :-</text:span></text:span></text:h>
      <text:p text:style-name="P44">This document defines the software infrastructure requirements for deploying a DPR (Daily Performance Report) Analytics Dashboard that provides real-time insights into Unit, Department, and Checklist performance. The solution is intended for enterprise environments requiring accurate analytics, dashboard visualization, scalability, reliability, and support for concurrent users.</text:p>
      <text:h text:style-name="P36" text:outline-level="3"><text:span text:style-name="Strong_20_Emphasis"><text:span text:style-name="T29">Solution Overview :-</text:span></text:span></text:h>
      <text:p text:style-name="P44">The DPR Analytics Dashboard retrieves Daily Performance Report data from the MySQL database, analyzes Unit, Department, and Checklist performance, calculates completion and lapsed statistics, predicts future performance trends using Machine Learning, and returns the analytics through backend APIs.</text:p>
      <text:h text:style-name="P36" text:outline-level="3"><text:span text:style-name="Strong_20_Emphasis"><text:span text:style-name="T29">API Endpoints :-</text:span></text:span></text:h>
      <text:list text:style-name="L4">
        <text:list-item>
          <text:p text:style-name="P45"><text:span text:style-name="Strong_20_Emphasis"><text:span text:style-name="T27">/dashboard/main</text:span></text:span><text:span text:style-name="T27"> - Returns the overall DPR dashboard summary including KPIs and analytics. </text:span><text:span text:style-name="Strong_20_Emphasis"><text:span text:style-name="T29">[GET]</text:span></text:span><text:span text:style-name="T16"> </text:span></text:p>
        </text:list-item>
        <text:list-item>
          <text:p text:style-name="P45"><text:span text:style-name="Strong_20_Emphasis"><text:span text:style-name="T27">/unit/list</text:span></text:span><text:span text:style-name="T27"> - Returns all available Units. </text:span><text:span text:style-name="Strong_20_Emphasis"><text:span text:style-name="T29">[GET]</text:span></text:span><text:span text:style-name="T16"> </text:span></text:p>
        </text:list-item>
        <text:list-item>
          <text:p text:style-name="P45"><text:span text:style-name="Strong_20_Emphasis"><text:span text:style-name="T27">/unit/dashboard/{unit_name}</text:span></text:span><text:span text:style-name="T27"> - Returns dashboard analytics for the selected Unit. </text:span><text:span text:style-name="Strong_20_Emphasis"><text:span text:style-name="T29">[GET]</text:span></text:span><text:span text:style-name="T16"> </text:span></text:p>
        </text:list-item>
        <text:list-item>
          <text:p text:style-name="P45"><text:span text:style-name="Strong_20_Emphasis"><text:span text:style-name="T27">/department/list</text:span></text:span><text:span text:style-name="T27"> - Returns all available Departments. </text:span><text:span text:style-name="Strong_20_Emphasis"><text:span text:style-name="T29">[GET]</text:span></text:span><text:span text:style-name="T27"> </text:span></text:p>
        </text:list-item>
        <text:list-item>
          <text:p text:style-name="P45"><text:span text:style-name="Strong_20_Emphasis"><text:span text:style-name="T27">/department/dashboard/{department_name}</text:span></text:span><text:span text:style-name="T27"> - Returns dashboard analytics for the selected Department. </text:span><text:span text:style-name="Strong_20_Emphasis"><text:span text:style-name="T29">[GET]</text:span></text:span><text:span text:style-name="T16"> </text:span></text:p>
        </text:list-item>
        <text:list-item>
          <text:p text:style-name="P45"><text:span text:style-name="Strong_20_Emphasis"><text:span text:style-name="T27">/checklist/list</text:span></text:span><text:span text:style-name="T27"> - Returns all available Checklists. </text:span><text:span text:style-name="Strong_20_Emphasis"><text:span text:style-name="T29">[GET]</text:span></text:span><text:span text:style-name="T16"> </text:span></text:p>
        </text:list-item>
        <text:list-item>
          <text:p text:style-name="P45"><text:span text:style-name="Strong_20_Emphasis"><text:span text:style-name="T27">/checklist/dashboard/{checklist_name}</text:span></text:span><text:span text:style-name="T27"> - Returns dashboard analytics for the selected Checklist. </text:span><text:span text:style-name="Strong_20_Emphasis"><text:span text:style-name="T29">[GET]</text:span></text:span><text:span text:style-name="T16"> </text:span></text:p>
        </text:list-item>
        <text:list-item>
          <text:p text:style-name="P46"><text:span text:style-name="Strong_20_Emphasis"><text:span text:style-name="T27">/predict/{entity_type}/{entity_name}</text:span></text:span><text:span text:style-name="T27"> - Returns Machine Learning-based trend prediction for Unit, Department, or Checklist. </text:span><text:span text:style-name="Strong_20_Emphasis"><text:span text:style-name="T29">[GET]</text:span></text:span><text:span text:style-name="T16"> </text:span></text:p>
        </text:list-item>
      </text:list>
      <text:p text:style-name="P47"/>
      <text:p text:style-name="P47"/>
      <text:h text:style-name="P48" text:outline-level="3"><text:soft-page-break/><text:span text:style-name="Strong_20_Emphasis"/></text:h>
      <text:h text:style-name="P48" text:outline-level="3"><text:span text:style-name="Strong_20_Emphasis"/></text:h>
      <text:h text:style-name="P48" text:outline-level="3"><text:span text:style-name="Strong_20_Emphasis">How to Run :-</text:span></text:h>
      <text:list text:style-name="L5">
        <text:list-item>
          <text:p text:style-name="P49">Ensure that MySQL has been installed locally. </text:p>
        </text:list-item>
        <text:list-item>
          <text:p text:style-name="P49">Ensure that the MySQL server is running. </text:p>
        </text:list-item>
        <text:list-item>
          <text:p text:style-name="P50"><text:span text:style-name="T23">Create a database named </text:span><text:span text:style-name="Strong_20_Emphasis"><text:span text:style-name="Source_20_Text"><text:span text:style-name="T23">dpr_trend_analysis</text:span></text:span></text:span><text:span text:style-name="T23">. </text:span></text:p>
        </text:list-item>
        <text:list-item>
          <text:p text:style-name="P50"><text:span text:style-name="T23">Import the SQL file </text:span><text:span text:style-name="Strong_20_Emphasis"><text:span text:style-name="Source_20_Text"><text:span text:style-name="T30">dpr_data</text:span></text:span></text:span><text:span text:style-name="Strong_20_Emphasis"><text:span text:style-name="Source_20_Text"><text:span text:style-name="T23">.sql</text:span></text:span></text:span><text:span text:style-name="T23"> into the </text:span><text:span text:style-name="Strong_20_Emphasis"><text:span text:style-name="Source_20_Text"><text:span text:style-name="T23">dpr_trend_analysis</text:span></text:span></text:span><text:span text:style-name="T23"> database. </text:span></text:p>
        </text:list-item>
        <text:list-item>
          <text:p text:style-name="P49">Update the MySQL database credentials in the configuration file. </text:p>
        </text:list-item>
        <text:list-item>
          <text:p text:style-name="P50"><text:span text:style-name="T23">Open the </text:span><text:span text:style-name="Strong_20_Emphasis"><text:span text:style-name="T23">DPR Analysis</text:span></text:span><text:span text:style-name="T23"> folder in VS Code. </text:span></text:p>
        </text:list-item>
        <text:list-item>
          <text:p text:style-name="P49">Open the backend folder in Terminal. </text:p>
        </text:list-item>
        <text:list-item>
          <text:p text:style-name="P50"><text:span text:style-name="T23">cmd - </text:span><text:span text:style-name="Source_20_Text"><text:span text:style-name="T23">python -m venv venv</text:span></text:span><text:span text:style-name="T23"> </text:span></text:p>
        </text:list-item>
        <text:list-item>
          <text:p text:style-name="P50"><text:span text:style-name="T23">cmd - </text:span><text:span text:style-name="Source_20_Text"><text:span text:style-name="T23">venv/Scripts/activate</text:span></text:span><text:span text:style-name="T23"> </text:span></text:p>
        </text:list-item>
        <text:list-item>
          <text:p text:style-name="P50"><text:span text:style-name="T23">cmd - </text:span><text:span text:style-name="Source_20_Text"><text:span text:style-name="T23">pip install -r requirements.txt</text:span></text:span><text:span text:style-name="T23"> </text:span></text:p>
        </text:list-item>
        <text:list-item>
          <text:p text:style-name="P50"><text:span text:style-name="T23">cmd - </text:span><text:span text:style-name="Source_20_Text"><text:span text:style-name="T23">python run.py</text:span></text:span><text:span text:style-name="T23"> </text:span></text:p>
        </text:list-item>
        <text:list-item>
          <text:p text:style-name="P51">Open the application or access the API endpoints. </text:p>
        </text:list-item>
        <text:list-item>
          <text:p text:style-name="P52">Open the frontend files<text:span text:style-name="T31">[dpr_frontend,dpr_frontend-prediction]</text:span> → index.html in chrome/edge</text:p>
          <text:p text:style-name="P52"/>
        </text:list-item>
      </text:list>
      <text:p text:style-name="P47"><text:span text:style-name="Strong_20_Emphasis"><text:span text:style-name="T32">{ =&gt; Ensure that Python, pip, and MySQL Server have been installed in your system. }</text:span></text:span></text:p>
      <text:p text:style-name="P44"/>
      <text:p text:style-name="P53"/>
      <text:p text:style-name="P6"/>
      <text:p text:style-name="P6"/>
      <text:p text:style-name="P6"/>
      <text:p text:style-name="P6"/>
      <text:p text:style-name="P6"/>
      <text:p text:style-name="P6"/>
      <text:p text:style-name="P6"/>
      <text:p text:style-name="P6"/>
      <text:p text:style-name="P6"/>
      <text:p text:style-name="P5"><text:soft-page-break/><text:span text:style-name="T2">5. Sentiment analysis :-</text:span></text:p>
      <text:h text:style-name="P54" text:outline-level="3"><text:span text:style-name="Strong_20_Emphasis"><text:span text:style-name="T16">Purpose :-</text:span></text:span></text:h>
      <text:p text:style-name="P19">Th<text:span text:style-name="T33">e</text:span> Sentiment Analysis system that classifies <text:span text:style-name="T33">patient </text:span>feedback into Positive, Negative, or Neutral sentiments using a fine-tuned Transformer model. The solution is intended for enterprise environments requiring high classification accuracy, scalability, reliability, and support for concurrent users.</text:p>
      <text:h text:style-name="P36" text:outline-level="3"><text:span text:style-name="Strong_20_Emphasis"><text:span text:style-name="T16">Solution Overview :-</text:span></text:span></text:h>
      <text:p text:style-name="P19">The Sentiment Analysis System receives <text:span text:style-name="T34">patient</text:span> feedback from the user, preprocesses the text, classifies the sentiment using a fine-tuned Transformer model, and returns the sentiment prediction through backend APIs. The system also supports batch prediction for analyzing multiple feedbacks in a single request.</text:p>
      <text:h text:style-name="P36" text:outline-level="3"><text:span text:style-name="Strong_20_Emphasis"><text:span text:style-name="T16">API Endpoints :-</text:span></text:span></text:h>
      <text:list text:style-name="L6">
        <text:list-item>
          <text:p text:style-name="P55"><text:span text:style-name="Strong_20_Emphasis"><text:span text:style-name="T16">/sentiment/predict</text:span></text:span><text:span text:style-name="T16"> - Gets a feedback sentence from the user and returns the predicted sentiment. </text:span><text:span text:style-name="Strong_20_Emphasis"><text:span text:style-name="T16">[POST]</text:span></text:span><text:span text:style-name="T16"> </text:span></text:p>
        </text:list-item>
        <text:list-item>
          <text:p text:style-name="P55"><text:span text:style-name="Strong_20_Emphasis"><text:span text:style-name="T16">/sentiment/predict-batch</text:span></text:span><text:span text:style-name="T16"> - Gets multiple feedback sentences and returns the predicted sentiment for each feedback. </text:span><text:span text:style-name="Strong_20_Emphasis"><text:span text:style-name="T16">[POST]</text:span></text:span><text:span text:style-name="T16"> </text:span></text:p>
        </text:list-item>
        <text:list-item>
          <text:p text:style-name="P56"><text:span text:style-name="Strong_20_Emphasis"><text:span text:style-name="T16">/sentiment/health</text:span></text:span><text:span text:style-name="T16"> - Returns the health status of the Sentiment Analysis service. </text:span><text:span text:style-name="Strong_20_Emphasis"><text:span text:style-name="T16">[GET]</text:span></text:span><text:span text:style-name="T16"> </text:span></text:p>
        </text:list-item>
      </text:list>
      <text:h text:style-name="P36" text:outline-level="3"><text:span text:style-name="Strong_20_Emphasis"><text:span text:style-name="T16">How to Run :-</text:span></text:span></text:h>
      <text:list text:style-name="L7">
        <text:list-item>
          <text:p text:style-name="P57"><text:span text:style-name="T25">Open the </text:span><text:span text:style-name="Strong_20_Emphasis"><text:span text:style-name="T25">Sentiment Analysis</text:span></text:span><text:span text:style-name="T25"> folder in VS Code. </text:span></text:p>
        </text:list-item>
        <text:list-item>
          <text:p text:style-name="P58">Open the backend folder in Terminal. </text:p>
        </text:list-item>
        <text:list-item>
          <text:p text:style-name="P57"><text:span text:style-name="T25">cmd - </text:span><text:span text:style-name="Source_20_Text"><text:span text:style-name="T25">python -m venv venv</text:span></text:span><text:span text:style-name="T25"> </text:span></text:p>
        </text:list-item>
        <text:list-item>
          <text:p text:style-name="P57"><text:span text:style-name="T25">cmd - </text:span><text:span text:style-name="Source_20_Text"><text:span text:style-name="T25">venv/Scripts/activate</text:span></text:span><text:span text:style-name="T25"> </text:span></text:p>
        </text:list-item>
        <text:list-item>
          <text:p text:style-name="P57"><text:span text:style-name="T25">cmd - </text:span><text:span text:style-name="Source_20_Text"><text:span text:style-name="T25">pip install -r requirements.txt</text:span></text:span><text:span text:style-name="T25"> </text:span></text:p>
        </text:list-item>
        <text:list-item>
          <text:p text:style-name="P59">Train the sentiment model using: <text:s text:c="3"/></text:p>
          <text:list>
            <text:list-header>
              <text:p text:style-name="P60"><text:span text:style-name="Source_20_Text"><text:span text:style-name="T35">[can extend the </text:span></text:span><text:span text:style-name="Source_20_Text"><text:span text:style-name="T36">backend/training/</text:span></text:span><text:span text:style-name="Source_20_Text"><text:span text:style-name="T35">sentiment_dataset.csv if needed ]</text:span></text:span></text:p>
            </text:list-header>
          </text:list>
          <text:p text:style-name="P60"><text:span text:style-name="Source_20_Text"><text:span text:style-name="T36"><text:s/><text:tab/></text:span></text:span><text:span text:style-name="Source_20_Text"><text:span text:style-name="T37">cmd - </text:span></text:span><text:span text:style-name="Source_20_Text"><text:span text:style-name="T36">python backend/training/train.py </text:span></text:span></text:p>
        </text:list-item>
        <text:list-item>
          <text:p text:style-name="P61"><text:span text:style-name="T36">After the model is successfully trained, run <text:s text:c="2"/>: <text:s/></text:span><text:span text:style-name="T37">cmd -</text:span><text:span text:style-name="T36"> <text:s/></text:span><text:span text:style-name="Source_20_Text"><text:span text:style-name="T36">python run.py</text:span></text:span></text:p>
        </text:list-item>
        <text:list-item>
          <text:p text:style-name="P62">Access the API endpoints through the FastAPI server. </text:p>
        </text:list-item>
        <text:list-item>
          <text:p text:style-name="P63">Open frontend folder → index.html in chrome/edge</text:p>
        </text:list-item>
      </text:list>
      <text:p text:style-name="P64"><text:span text:style-name="Strong_20_Emphasis"><text:span text:style-name="T27">{ =&gt; Ensure that Python and pip have been installed in your system. }</text:span></text:span></text:p>
      <text:p text:style-name="P3"><text:soft-page-break/>6.Department &amp; Division Recommendation :-</text:p>
      <text:p text:style-name="P65"/>
      <text:h text:style-name="P66" text:outline-level="3"><text:span text:style-name="Strong_20_Emphasis">Purpose :-</text:span></text:h>
      <text:p text:style-name="P67">Th<text:span text:style-name="T38">e</text:span> Department &amp; Division Recommendation system that recommends the most appropriate Department and Division for a given checklist question using semantic search with embeddings and a vector database. The solution is intended for enterprise environments requiring high recommendation accuracy, low response time, scalability, reliability, and support for concurrent users <text:span text:style-name="T38">instead of manual selection.</text:span></text:p>
      <text:h text:style-name="P68" text:outline-level="3"><text:span text:style-name="Strong_20_Emphasis">Solution Overview :-</text:span></text:h>
      <text:p text:style-name="P67">The Department &amp; Division Recommendation System receives a checklist question from the user, converts the text into embeddings using a Sentence Transformer model, searches similar questions stored in the Qdrant Vector Database, and returns the most relevant Department and Division through backend APIs. The system also allows administrators to add, update, delete, and manage questions, which are synchronized between MySQL and the vector database.</text:p>
      <text:h text:style-name="P68" text:outline-level="3"><text:span text:style-name="Strong_20_Emphasis">API Endpoints :-</text:span></text:h>
      <text:list text:style-name="L8">
        <text:list-item>
          <text:p text:style-name="P69"><text:span text:style-name="Strong_20_Emphasis">/questions/predict</text:span> - Gets a checklist question from the user and returns the recommended Department and Division based on semantic similarity. <text:span text:style-name="Strong_20_Emphasis">[POST]</text:span> </text:p>
        </text:list-item>
        <text:list-item>
          <text:p text:style-name="P69"><text:span text:style-name="Strong_20_Emphasis">/questions/add</text:span> - Adds a new question along with its Department and Division. The data is stored in MySQL and indexed in the Qdrant Vector Database. <text:span text:style-name="Strong_20_Emphasis">[POST]</text:span> </text:p>
        </text:list-item>
        <text:list-item>
          <text:p text:style-name="P69"><text:span text:style-name="Strong_20_Emphasis">/questions</text:span> - Returns all stored questions with their corresponding Department and Division. <text:span text:style-name="Strong_20_Emphasis">[GET]</text:span> </text:p>
        </text:list-item>
        <text:list-item>
          <text:p text:style-name="P69"><text:span text:style-name="Strong_20_Emphasis">/questions/{question_id}</text:span> - Returns the details of a specific question. <text:span text:style-name="Strong_20_Emphasis">[GET]</text:span> </text:p>
        </text:list-item>
        <text:list-item>
          <text:p text:style-name="P69"><text:span text:style-name="Strong_20_Emphasis">/questions/{question_id}</text:span> - Updates an existing question, Department, and Division in both MySQL and Qdrant. <text:span text:style-name="Strong_20_Emphasis">[PUT]</text:span> </text:p>
        </text:list-item>
        <text:list-item>
          <text:p text:style-name="P69"><text:span text:style-name="Strong_20_Emphasis">/questions/{question_id}</text:span> - Deletes a question from MySQL and the Qdrant Vector Database. <text:span text:style-name="Strong_20_Emphasis">[DELETE]</text:span> </text:p>
        </text:list-item>
        <text:list-item>
          <text:p text:style-name="P70"><text:span text:style-name="Strong_20_Emphasis">/health</text:span> - Returns the health status of the application, MySQL database, Qdrant Vector Database, and embedding model. <text:span text:style-name="Strong_20_Emphasis">[GET]</text:span> </text:p>
        </text:list-item>
      </text:list>
      <text:h text:style-name="P68" text:outline-level="3"><text:soft-page-break/><text:span text:style-name="Strong_20_Emphasis"/></text:h>
      <text:h text:style-name="P68" text:outline-level="3"><text:span text:style-name="Strong_20_Emphasis"/></text:h>
      <text:h text:style-name="P68" text:outline-level="3"><text:span text:style-name="Strong_20_Emphasis">How to Run :-</text:span></text:h>
      <text:list text:style-name="L9">
        <text:list-item>
          <text:p text:style-name="P71">Ensure that MySQL has been installed locally <text:span text:style-name="T39">.</text:span></text:p>
        </text:list-item>
        <text:list-item>
          <text:p text:style-name="P72"><text:span text:style-name="T36">Create a database named </text:span><text:span text:style-name="Strong_20_Emphasis"><text:span text:style-name="Source_20_Text"><text:span text:style-name="T36">department_prediction</text:span></text:span></text:span><text:span text:style-name="T36">. </text:span></text:p>
        </text:list-item>
        <text:list-item>
          <text:p text:style-name="P73">Add <text:s/>data in backend/Importing_data/question_DD_data.csv [ clear all &amp; add historical data ]</text:p>
        </text:list-item>
        <text:list-item>
          <text:p text:style-name="P71">Ensure that Qdrant has been installed locally and is running. </text:p>
        </text:list-item>
        <text:list-item>
          <text:p text:style-name="P72"><text:span text:style-name="T36">Open the </text:span><text:span text:style-name="Strong_20_Emphasis"><text:span text:style-name="T36">Department &amp; Division Recommendation</text:span></text:span><text:span text:style-name="T36"> folder in VS Code. </text:span></text:p>
        </text:list-item>
        <text:list-item>
          <text:p text:style-name="P71">Open the backend folder in Terminal. </text:p>
        </text:list-item>
        <text:list-item>
          <text:p text:style-name="P72"><text:span text:style-name="T36">cmd - </text:span><text:span text:style-name="Source_20_Text"><text:span text:style-name="T36">python -m venv venv</text:span></text:span><text:span text:style-name="T36"> </text:span></text:p>
        </text:list-item>
        <text:list-item>
          <text:p text:style-name="P72"><text:span text:style-name="T36">cmd - </text:span><text:span text:style-name="Source_20_Text"><text:span text:style-name="T36">venv/Scripts/activate</text:span></text:span><text:span text:style-name="T36"> </text:span></text:p>
        </text:list-item>
        <text:list-item>
          <text:p text:style-name="P72"><text:span text:style-name="T36">cmd - </text:span><text:span text:style-name="Source_20_Text"><text:span text:style-name="T36">pip install -r requirements.txt</text:span></text:span><text:span text:style-name="T36"> </text:span></text:p>
        </text:list-item>
        <text:list-item>
          <text:p text:style-name="P74"><text:s/><text:span text:style-name="T40">cmd – </text:span><text:span text:style-name="T16">python -m Importing_data.import_to_mysql</text:span></text:p>
        </text:list-item>
        <text:list-item>
          <text:p text:style-name="P75"><text:span text:style-name="T36">Update the MySQL database credentials in the </text:span><text:span text:style-name="Strong_20_Emphasis"><text:span text:style-name="Source_20_Text"><text:span text:style-name="T36">.env</text:span></text:span></text:span><text:span text:style-name="T36"> file. </text:span></text:p>
        </text:list-item>
        <text:list-item>
          <text:p text:style-name="P72"><text:span text:style-name="T36">Update the Qdrant configuration in the </text:span><text:span text:style-name="Strong_20_Emphasis"><text:span text:style-name="Source_20_Text"><text:span text:style-name="T36">.env</text:span></text:span></text:span><text:span text:style-name="T36"> file if required. </text:span></text:p>
        </text:list-item>
        <text:list-item>
          <text:p text:style-name="P71">Run the data import scripts to populate MySQL and Qdrant (if the database is empty). </text:p>
        </text:list-item>
        <text:list-item>
          <text:p text:style-name="P76"><text:span text:style-name="T36">cmd - </text:span><text:span text:style-name="Source_20_Text"><text:span text:style-name="T36">python run.py</text:span></text:span><text:span text:style-name="T36"> </text:span></text:p>
        </text:list-item>
      </text:list>
      <text:p text:style-name="P67"><text:span text:style-name="Strong_20_Emphasis"><text:span text:style-name="T32">{ =&gt; Ensure that Python, pip, MySQL Server, and Qdrant have been installed in your system. }</text:span></text:span></text:p>
      <text:p text:style-name="P77"/>
      <text:p text:style-name="P77"/>
      <text:p text:style-name="P77"/>
      <text:p text:style-name="P77"/>
      <text:p text:style-name="P77"/>
      <text:p text:style-name="P77"/>
      <text:p text:style-name="P77"/>
      <text:p text:style-name="P77"/>
      <text:p text:style-name="P78">Complete Zip File Link : <text:span text:style-name="T41">https://drive.google.com/drive/folders/1mAXJIM728ESXBhc4OE2tL0VePOadK0If?usp=sharing</text:span></text:p>
      <text:p text:style-name="P77"/>
      <text:p text:style-name="P77"/>
      <text:p text:style-name="P77"/>
      <text:p text:style-name="P77"/>
      <text:p text:style-name="P79"><text:soft-page-break/>Local Installation of Qdrant :-</text:p>
      <text:p text:style-name="P80"/>
      <text:p text:style-name="P81"><text:span text:style-name="T39">Link : <text:s text:c="3"/></text:span><text:a xlink:type="simple" xlink:href="https://github.com/qdrant/qdrant/releases?utm_source=chatgpt.com" text:style-name="Internet_20_link" text:visited-style-name="Visited_20_Internet_20_Link">https://github.com/qdrant/qdrant/releases?utm_source=chatgpt.com</text:a> </text:p>
      <text:p text:style-name="P81">download : qdrant-x86_64-pc-windows-msvc.zip [for windows] </text:p>
      <text:p text:style-name="P81">download : qdrant_1.xx.x-1_amd64.deb [for ubuntu]</text:p>
      <text:list text:style-name="L10">
        <text:list-item>
          <text:p text:style-name="P82">For Ubuntu :-</text:p>
          <text:list>
            <text:list-item>
              <text:p text:style-name="P82">sudo dpkg -i qdrant_1.15.5-1_amd64.deb</text:p>
            </text:list-item>
            <text:list-item>
              <text:p text:style-name="P82">sudo apt --fix-broken install [ only if dependencies missing]</text:p>
            </text:list-item>
            <text:list-item>
              <text:p text:style-name="P82">start : sudo systemctl start qdrant</text:p>
            </text:list-item>
            <text:list-item>
              <text:p text:style-name="P82">enable it on boot : sudo systemctl enable qdrant</text:p>
            </text:list-item>
          </text:list>
        </text:list-item>
        <text:list-item>
          <text:p text:style-name="P82">For Windows :-</text:p>
          <text:list>
            <text:list-item>
              <text:p text:style-name="P82">open the downloaded <text:span text:style-name="T39">file </text:span>folder in cmd <text:s/><text:span text:style-name="T39">[/qdrant_service]</text:span></text:p>
            </text:list-item>
            <text:list-item>
              <text:p text:style-name="P82">qdrant.exe</text:p>
            </text:list-item>
          </text:list>
        </text:list-item>
      </text:list>
      <text:p text:style-name="P83"/>
      <text:p text:style-name="P84">To see web-ui</text:p>
      <text:list text:style-name="L11">
        <text:list-item>
          <text:p text:style-name="P85">Open the qdrant_service folder in vs code</text:p>
        </text:list-item>
        <text:list-item>
          <text:p text:style-name="P85">open ‘<text:span text:style-name="T42">qdrant_service/</text:span>qdrant-web-ui-frontend’ folder in Terminal</text:p>
        </text:list-item>
        <text:list-item>
          <text:p text:style-name="P85">cmd – npm install </text:p>
        </text:list-item>
        <text:list-item>
          <text:p text:style-name="P85">cmd – npm start</text:p>
        </text:list-item>
        <text:list-item>
          <text:p text:style-name="P85">Open<text:span text:style-name="T43"> : http://localhost:5173/</text:span></text:p>
        </text:list-item>
      </text:list>
      <text:p text:style-name="P86">{ =&gt; <text:s text:c="2"/>It is to see the locally installed qdrant vector db Web – ui <text:s text:c="2"/>}</text:p>
      <text:p text:style-name="P86"/>
      <text:p text:style-name="P86"/>
      <text:p text:style-name="P8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16:39:48.449194815</meta:creation-date>
    <dc:date>2026-07-01T09:34:10.860281477</dc:date>
    <meta:editing-duration>PT1H14M53S</meta:editing-duration>
    <meta:editing-cycles>4</meta:editing-cycles>
    <meta:generator>LibreOffice/26.2.4.2$Linux_X86_64 LibreOffice_project/620$Build-2</meta:generator>
    <meta:document-statistic meta:table-count="0" meta:image-count="0" meta:object-count="0" meta:page-count="9" meta:paragraph-count="169" meta:word-count="1752" meta:character-count="11915" meta:non-whitespace-character-count="10188"/>
  </office:meta>
</office:document-meta>
</file>